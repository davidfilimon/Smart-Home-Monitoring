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875in" fo:margin-left="0in" fo:margin-top="0in" fo:margin-bottom="0in" table:align="left" style:writing-mode="page"/>
    </style:style>
    <style:style style:name="Table1.A" style:family="table-column">
      <style:table-column-properties style:column-width="3.4188in"/>
    </style:style>
    <style:style style:name="Table1.B" style:family="table-column">
      <style:table-column-properties style:column-width="0.2493in"/>
    </style:style>
    <style:style style:name="Table1.C" style:family="table-column">
      <style:table-column-properties style:column-width="3.4194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417in" style:contextual-spacing="false" fo:text-align="center" style:justify-single-word="false"/>
    </style:style>
    <style:style style:name="P3" style:family="paragraph" style:parent-style-name="Standard">
      <style:paragraph-properties fo:margin-top="0in" fo:margin-bottom="0.139in" style:contextual-spacing="false" fo:text-align="center" style:justify-single-word="false"/>
    </style:style>
    <style:style style:name="P4" style:family="paragraph" style:parent-style-name="Standard">
      <style:paragraph-properties fo:margin-top="0in" fo:margin-bottom="0.028in" style:contextual-spacing="false" fo:line-height="92%" fo:text-align="justify" style:justify-single-word="false" loext:word-spacing-minimum="75%" loext:word-spacing-maximum="133%"/>
    </style:style>
    <style:style style:name="P5" style:family="paragraph" style:parent-style-name="Standard">
      <style:paragraph-properties fo:margin-top="0.028in" fo:margin-bottom="0.0835in" style:contextual-spacing="false" fo:line-height="92%" fo:text-align="justify" style:justify-single-word="false" loext:word-spacing-minimum="75%" loext:word-spacing-maximum="133%"/>
    </style:style>
    <style:style style:name="P6" style:family="paragraph" style:parent-style-name="Standard">
      <style:paragraph-properties fo:margin-top="0in" fo:margin-bottom="0.0555in" style:contextual-spacing="false" fo:padding-left="0in" fo:padding-right="0in" fo:padding-top="0in" fo:padding-bottom="0.0138in" fo:border-left="none" fo:border-right="none" fo:border-top="none" fo:border-bottom="0.51pt solid #000000"/>
    </style:style>
    <style:style style:name="P7" style:family="paragraph" style:parent-style-name="Standard">
      <style:paragraph-properties fo:margin-top="0.0555in" fo:margin-bottom="0.028in" style:contextual-spacing="false" fo:line-height="92%" fo:text-align="left" style:justify-single-word="false"/>
    </style:style>
    <style:style style:name="P8" style:family="paragraph" style:parent-style-name="Standard">
      <style:paragraph-properties fo:margin-top="0in" fo:margin-bottom="0.028in" style:contextual-spacing="false" fo:line-height="92%" fo:text-align="justify" style:justify-single-word="false" fo:text-indent="0.25in" style:auto-text-indent="false" loext:word-spacing-minimum="75%" loext:word-spacing-maximum="133%"/>
    </style:style>
    <style:style style:name="P9" style:family="paragraph" style:parent-style-name="Standard">
      <style:paragraph-properties fo:margin-left="0.25in" fo:margin-top="0in" fo:margin-bottom="0.0209in" style:contextual-spacing="false" fo:line-height="83%" fo:text-indent="-0.25in" style:auto-text-indent="false"/>
    </style:style>
    <style:style style:name="T1" style:family="text">
      <style:text-properties style:font-name="Times New Roman" fo:font-size="18pt" fo:font-weight="normal" style:font-family-asian="'Times New Roman'" style:font-family-generic-asian="system" style:font-pitch-asian="variable" style:font-size-asian="18pt" style:font-weight-asian="normal" style:font-family-complex="'Times New Roman'" style:font-family-generic-complex="system" style:font-pitch-complex="variable" style:font-size-complex="18pt" style:font-weight-complex="normal"/>
    </style:style>
    <style:style style:name="T2" style:family="text">
      <style:text-properties style:font-name="Times New Roman" fo:font-size="11pt" style:font-family-asian="'Times New Roman'" style:font-family-generic-asian="system" style:font-pitch-asian="variable" style:font-size-asian="11pt" style:font-family-complex="'Times New Roman'" style:font-family-generic-complex="system" style:font-pitch-complex="variable" style:font-size-complex="11pt"/>
    </style:style>
    <style:style style:name="T3" style:family="text">
      <style:text-properties style:font-name="Times New Roman" fo:font-size="9pt" style:font-family-asian="'Times New Roman'" style:font-family-generic-asian="system" style:font-pitch-asian="variable" style:font-size-asian="9pt" style:font-family-complex="'Times New Roman'" style:font-family-generic-complex="system" style:font-pitch-complex="variable" style:font-size-complex="9pt"/>
    </style:style>
    <style:style style:name="T4" style:family="text">
      <style:text-properties style:font-name="Times New Roman" fo:font-size="9pt" fo:font-weight="bold" style:font-family-asian="'Times New Roman'" style:font-family-generic-asian="system" style:font-pitch-asian="variable" style:font-size-asian="9pt" style:font-weight-asian="bold" style:font-family-complex="'Times New Roman'" style:font-family-generic-complex="system" style:font-pitch-complex="variable" style:font-size-complex="9pt" style:font-weight-complex="bold"/>
    </style:style>
    <style:style style:name="T5" style:family="text">
      <style:text-properties fo:font-variant="normal" fo:text-transform="none" style:font-name="Times New Roman" fo:font-size="10pt" fo:font-style="normal" fo:font-weight="bold" style:font-family-asian="'Times New Roman'" style:font-family-generic-asian="system" style:font-pitch-asian="variable" style:font-size-asian="10pt" style:font-style-asian="normal" style:font-weight-asian="bold" style:font-family-complex="'Times New Roman'" style:font-family-generic-complex="system" style:font-pitch-complex="variable" style:font-size-complex="10pt" style:font-style-complex="normal" style:font-weight-complex="bold"/>
    </style:style>
    <style:style style:name="T6" style:family="text">
      <style:text-properties fo:font-variant="normal" fo:text-transform="none" style:font-name="Times New Roman" fo:font-size="10pt" fo:font-style="normal" fo:font-weight="normal" style:font-family-asian="'Times New Roman'" style:font-family-generic-asian="system" style:font-pitch-asian="variable" style:font-size-asian="10pt" style:font-style-asian="normal" style:font-weight-asian="normal" style:font-family-complex="'Times New Roman'" style:font-family-generic-complex="system" style:font-pitch-complex="variable"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vacy-Aware Smart Home Monitoring for Daily Routine Anomaly Detection</text:span></text:p>
      <text:p text:style-name="P2"><text:span text:style-name="T2">Firstname Lastname</text:span></text:p>
      <text:p text:style-name="P2"><text:span text:style-name="T3">Department of Computer Science, University Name, City, Country</text:span></text:p>
      <text:p text:style-name="P3"><text:span text:style-name="T3">email@university.edu</text:span></text:p>
      <text:p text:style-name="P4"><text:span text:style-name="T4">Abstract</text:span><text:span text:style-name="T3">—This paper presents a privacy-aware smart-home monitoring prototype for detecting daily routine anomalies using ambient sensor data. The system models routine behavior from minimized sensor-derived features and detects deviations such as inactivity, unusual nighttime movement, missed routines, and possible sensor failure. The prototype compares rule-based anomaly detection and Isolation Forest under different privacy representations, including raw-derived features, sensor pseudonymization, hourly aggregation, and daily minimized features. The system includes a caregiver notification policy and dashboard while avoiding camera, audio, and biometric data. Results are reported as a course prototype and are not presented as clinically validated evidence.</text:span></text:p>
      <text:p text:style-name="P5"><text:span text:style-name="T4">Index Terms</text:span><text:span text:style-name="T3">—anomaly detection, smart home, ambient sensors, privacy-by-design, Isolation Forest, independent living.</text:span></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5">I. Introduction</text:span></text:p>
            <text:p text:style-name="P8"><text:span text:style-name="T6">Smart homes can support independent living by monitoring routine behavior through ambient sensors. However, continuous monitoring can become intrusive if raw data is collected unnecessarily. This project addresses the trade-off between anomaly detection quality and privacy preservation.</text:span></text:p>
            <text:p text:style-name="P8"><text:span text:style-name="T6">The system aims to detect deviations from established daily patterns without resorting to invasive data modalities. Prior work on activity recognition and anomaly detection has largely focused on performance metrics while underemphasizing privacy constraints. Our prototype explicitly encodes privacy-by-design principles from the outset.</text:span></text:p>
            <text:p text:style-name="P7"><text:span text:style-name="T5">II. Project Specification</text:span></text:p>
            <text:p text:style-name="P8"><text:span text:style-name="T6">The objective is to build an isolated prototype that uses public or simulated smart-home data to detect daily routine anomalies. The input consists of timestamped ambient sensor events. The output consists of anomaly scores, anomaly labels, notification levels, and dashboard visualizations.</text:span></text:p>
            <text:p text:style-name="P8"><text:span text:style-name="T6">The prototype does not perform medical diagnosis, does not confirm fall events, and does not replace professional emergency care. All caregiver notifications are worded as routine deviations rather than health conclusions, to prevent over-reliance on automated assessment.</text:span></text:p>
            <text:p text:style-name="P7"><text:span text:style-name="T5">III. Dataset Protocol</text:span></text:p>
            <text:p text:style-name="P8"><text:span text:style-name="T6">The recommended dataset is CASAS Aruba or an equivalent public ambient smart-home dataset. The raw events are parsed, normalized, and transformed into daily and hourly feature vectors. Synthetic anomaly scenarios are injected when labeled anomalies are unavailable in the source data.</text:span></text:p>
            <text:p text:style-name="P8"><text:span text:style-name="T6">Sensor events include motion triggers, contact sensors on doors and appliances, and environmental readings such as temperature and light levels. No camera, microphone, or biometric sensor data is used at any stage of the pipeline.</text:span></text:p>
            <text:p text:style-name="P7"><text:span text:style-name="T5">IV. System Architecture</text:span></text:p>
            <text:p text:style-name="P8"><text:span text:style-name="T6">The architecture contains five stages: data ingestion, feature extraction, privacy transformation, anomaly detection, and dashboard presentation. Each stage is designed as an independent module to facilitate replacement or extension.</text:span></text:p>
            <text:p text:style-name="P8"><text:span text:style-name="T6">Data ingestion normalizes raw timestamped events into a canonical format. Feature extraction aggregates events into hourly and daily windows. Privacy transformation applies one of four selectable representations. Anomaly detection applies the configured method. The dashboard presents results and sends caregiver notifications according to the configured policy.</text:span></text:p>
          </table:table-cell>
          <table:table-cell table:style-name="Table1.A1" office:value-type="string">
            <text:p text:style-name="Standard"/>
          </table:table-cell>
          <table:table-cell table:style-name="Table1.A1" office:value-type="string">
            <text:p text:style-name="P7"><text:span text:style-name="T5">V. Anomaly Detection Method</text:span></text:p>
            <text:p text:style-name="P8"><text:span text:style-name="T6">Two anomaly detection methods are implemented. The first is a rule-based baseline using configurable thresholds for inactivity periods, nighttime movement, missed routines, and missing data segments.</text:span></text:p>
            <text:p text:style-name="P8"><text:span text:style-name="T6">The second is an Isolation Forest model trained on routine feature vectors derived from several weeks of normal operation. Isolation Forest is well-suited to this task because it does not assume a parametric distribution and scales efficiently to the feature dimensionality employed here.</text:span></text:p>
            <text:p text:style-name="P8"><text:span text:style-name="T6">Both methods produce an anomaly score and a binary anomaly label per evaluation window. Rule-based thresholds are set heuristically and serve as an interpretable baseline against which the Isolation Forest results are compared.</text:span></text:p>
            <text:p text:style-name="P7"><text:span text:style-name="T5">VI. Privacy-by-Design</text:span></text:p>
            <text:p text:style-name="P8"><text:span text:style-name="T6">Privacy is addressed through four complementary mechanisms: data minimization, sensor pseudonymization, temporal aggregation, and feature-level minimization. Four privacy levels are compared experimentally.</text:span></text:p>
            <text:p text:style-name="P8"><text:span text:style-name="T6">At the first level, raw-derived features retain full sensor identity and temporal resolution. At the second level, sensor identifiers are replaced with pseudonyms so that spatial layout cannot be inferred. At the third level, events are aggregated into hourly counts, removing fine-grained temporal information. At the fourth level, only daily summary statistics are retained, representing the most aggressive minimization strategy.</text:span></text:p>
            <text:p text:style-name="P8"><text:span text:style-name="T6">The trade-off between privacy protection and detection performance is evaluated across these four levels to provide empirical guidance for deployment decisions.</text:span></text:p>
            <text:p text:style-name="P7"><text:span text:style-name="T5">VII. Evaluation</text:span></text:p>
            <text:p text:style-name="P8"><text:span text:style-name="T6">The evaluation considers five scenarios: normal routine, extended inactivity, unusual nighttime movement, missed routine, and sensor failure. Performance metrics include precision, recall, F1-score, false-positive rate, and qualitative privacy risk rating.</text:span></text:p>
            <text:p text:style-name="P8"><text:span text:style-name="T6">Results are reported per scenario and per privacy level. Because the dataset consists of simulated or partially labeled data, the evaluation is presented as a preliminary characterization of system behavior rather than a statistically validated performance benchmark.</text:span></text:p>
            <text:p text:style-name="P7"><text:span text:style-name="T5">VIII. Ethical and Safety Review</text:span></text:p>
            <text:p text:style-name="P8"><text:span text:style-name="T6">The system is intended only as a course prototype. It does not perform medical diagnosis, does not confirm falls, and does not replace emergency care. Caregiver notifications are restricted to routine deviation language to avoid creating false urgency or unwarranted clinical inference.</text:span></text:p>
            <text:p text:style-name="P8"><text:span text:style-name="T6">Data minimization and pseudonymization reduce re-</text:span><text:soft-page-break/><text:span text:style-name="T6">identification risk. The prototype does not store raw sensor streams beyond the aggregation window, and no data is transmitted outside the local network environment.</text:span></text:p>
            <text:p text:style-name="P7"><text:span text:style-name="T5">IX. Conclusion</text:span></text:p>
            <text:p text:style-name="P8"><text:span text:style-name="T6">The prototype demonstrates that daily routine anomalies can be detected from ambient smart-home data while reducing sensitive data collection through aggregation and minimization. The comparison between rule-based detection and Isolation Forest across four privacy levels provides a structured basis for evaluating the privacy-utility trade-off in future deployments.</text:span></text:p>
            <text:p text:style-name="P8"><text:span text:style-name="T6">The results should be interpreted within the limited scope of a short academic project. Future work includes validation on real labeled datasets, user studies with caregivers, and integration of differential privacy mechanisms.</text:span></text:p>
            <text:p text:style-name="P7"><text:span text:style-name="T5">References</text:span></text:p>
            <text:p text:style-name="P9"><text:span text:style-name="T3">[1] D. Cook and N. Krishnan, "Activity Learning: Discovering, Recognizing, and Predicting Human Behavior from Sensor Data," Wiley, 2015.</text:span></text:p>
            <text:p text:style-name="P9"><text:span text:style-name="T3">[2] F. T. Liu, K. M. Ting, and Z. H. Zhou, "Isolation Forest," in Proc. 8th IEEE Int. Conf. Data Mining, 2008, pp. 413–422.</text:span></text:p>
            <text:p text:style-name="P9"><text:span text:style-name="T3">[3] CASAS Smart Home Project, Washington State University. [Online]. Available: http://casas.wsu.edu/</text:span></text:p>
            <text:p text:style-name="P9"><text:span text:style-name="T3">[4] A. Cavoukian, "Privacy by Design: The 7 Foundational Principles," Information and Privacy Commissioner of Ontario, 2009.</text:span></text:p>
            <text:p text:style-name="P9"><text:span text:style-name="T3">[5] M. Wirth and J. Häußler, "Anomaly Detection in Smart Home Environments Using Machine Learning," in Proc. IEEE Int. Conf. Pervasive Computing, 2020.</text:span></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7083in" fo:margin-bottom="0.3335in" fo:margin-left="0.5902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752in" fo:margin-left="0in" fo:margin-right="0in" fo:margin-top="0.3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5-29T15:46:13.320000000</meta:creation-date>
    <dc:date>2026-05-29T18:51:08.736732437</dc:date>
    <meta:editing-duration>PT3M51S</meta:editing-duration>
    <meta:document-statistic meta:table-count="1" meta:image-count="0" meta:object-count="0" meta:page-count="2" meta:paragraph-count="42" meta:word-count="984" meta:character-count="7319" meta:non-whitespace-character-count="6380"/>
    <meta:generator>LibreOffice/26.2.3.2$Linux_X86_64 LibreOffice_project/620$Build-2</meta:generator>
  </office:meta>
</office:document-meta>
</file>